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C0000015EFDA29CC2.png" manifest:media-type="image/png"/>
  <manifest:file-entry manifest:full-path="Pictures/10000001000002F90000021D63272220.png" manifest:media-type="image/png"/>
  <manifest:file-entry manifest:full-path="Pictures/10000001000002F70000027A3C88B5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21f08" officeooo:paragraph-rsid="00021f08"/>
    </style:style>
    <style:style style:name="P2" style:family="paragraph" style:parent-style-name="Standard">
      <style:text-properties officeooo:rsid="00029e06" officeooo:paragraph-rsid="00029e06"/>
    </style:style>
    <style:style style:name="P3" style:family="paragraph" style:parent-style-name="Standard">
      <style:text-properties officeooo:rsid="00044382" officeooo:paragraph-rsid="00044382"/>
    </style:style>
    <style:style style:name="P4" style:family="paragraph" style:parent-style-name="Standard">
      <style:text-properties fo:font-weight="bold" officeooo:rsid="00021f08" officeooo:paragraph-rsid="00021f08" style:font-weight-asian="bold" style:font-weight-complex="bold"/>
    </style:style>
    <style:style style:name="P5" style:family="paragraph" style:parent-style-name="Standard">
      <style:text-properties fo:font-weight="bold" officeooo:rsid="00029e06" officeooo:paragraph-rsid="00029e06" style:font-weight-asian="bold" style:font-weight-complex="bold"/>
    </style:style>
    <style:style style:name="P6" style:family="paragraph" style:parent-style-name="Standard">
      <style:text-properties fo:font-weight="bold" officeooo:rsid="0006cdfd" officeooo:paragraph-rsid="0006cdfd" style:font-weight-asian="bold" style:font-weight-complex="bold"/>
    </style:style>
    <style:style style:name="P7" style:family="paragraph" style:parent-style-name="Standard">
      <style:text-properties fo:font-weight="bold" officeooo:rsid="0006d352" officeooo:paragraph-rsid="0006d352" style:font-weight-asian="bold" style:font-weight-complex="bold"/>
    </style:style>
    <style:style style:name="P8" style:family="paragraph" style:parent-style-name="Standard">
      <style:text-properties fo:font-weight="bold" officeooo:rsid="00089be2" officeooo:paragraph-rsid="00089be2" style:font-weight-asian="bold" style:font-weight-complex="bold"/>
    </style:style>
    <style:style style:name="P9" style:family="paragraph" style:parent-style-name="Standard">
      <style:text-properties fo:font-weight="bold" officeooo:rsid="000a6bd2" officeooo:paragraph-rsid="000a6bd2" style:font-weight-asian="bold" style:font-weight-complex="bold"/>
    </style:style>
    <style:style style:name="P10" style:family="paragraph" style:parent-style-name="Standard">
      <style:text-properties fo:font-weight="bold" officeooo:rsid="000b4f63" officeooo:paragraph-rsid="000b4f63" style:font-weight-asian="bold" style:font-weight-complex="bold"/>
    </style:style>
    <style:style style:name="P11" style:family="paragraph" style:parent-style-name="Standard">
      <style:text-properties officeooo:rsid="00064e20" officeooo:paragraph-rsid="00064e20"/>
    </style:style>
    <style:style style:name="P12" style:family="paragraph" style:parent-style-name="Standard">
      <style:text-properties officeooo:paragraph-rsid="00064e20"/>
    </style:style>
    <style:style style:name="P13" style:family="paragraph" style:parent-style-name="Standard">
      <style:text-properties fo:font-weight="normal" officeooo:rsid="0006cdfd" officeooo:paragraph-rsid="0006cdfd" style:font-weight-asian="normal" style:font-weight-complex="normal"/>
    </style:style>
    <style:style style:name="P14" style:family="paragraph" style:parent-style-name="Standard">
      <style:text-properties fo:font-weight="normal" officeooo:rsid="0006d352" officeooo:paragraph-rsid="0006d352" style:font-weight-asian="normal" style:font-weight-complex="normal"/>
    </style:style>
    <style:style style:name="P15" style:family="paragraph" style:parent-style-name="Standard">
      <style:text-properties fo:font-weight="normal" officeooo:rsid="000b4f63" officeooo:paragraph-rsid="000b4f63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italic" fo:font-weight="normal" officeooo:rsid="008e40ab" officeooo:paragraph-rsid="0006e536" style:font-style-asian="italic" style:font-weight-asian="normal" style:font-style-complex="italic" style:font-weight-complex="normal"/>
    </style:style>
    <style:style style:name="T1" style:family="text">
      <style:text-properties officeooo:rsid="0004438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522e4"/>
    </style:style>
    <style:style style:name="T4" style:family="text">
      <style:text-properties officeooo:rsid="0005b5a6"/>
    </style:style>
    <style:style style:name="T5" style:family="text">
      <style:text-properties officeooo:rsid="00064e20"/>
    </style:style>
    <style:style style:name="T6" style:family="text">
      <style:text-properties officeooo:rsid="0006d352"/>
    </style:style>
    <style:style style:name="T7" style:family="text">
      <style:text-properties officeooo:rsid="0079301f"/>
    </style:style>
    <style:style style:name="T8" style:family="text">
      <style:text-properties officeooo:rsid="00089be2"/>
    </style:style>
    <style:style style:name="T9" style:family="text">
      <style:text-properties style:font-name="Liberation Seri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p51R_mc0"/><text:span text:style-name="T9">Sistema Inteligente de Votação e Decisão em Grupo</text:span></text:p>
      <text:p text:style-name="P4"/>
      <text:p text:style-name="P4">Requisitos funcionais:</text:p>
      <text:p text:style-name="P1"/>
      <text:p text:style-name="P1">1. O sistema deve permitir votação de usuários abrangendo diferentes opiniões;</text:p>
      <text:p text:style-name="P1">2. O sistema deve contar votos, tirar médias e auxiliar decisões coletivas;</text:p>
      <text:p text:style-name="P1">3. Os resultados das votações devem ser visualizados em percentuais e gráficos;</text:p>
      <text:p text:style-name="P1">4. Deve suportar diferentes tipos de votações;</text:p>
      <text:p text:style-name="P1">5. Os votos devem ser contados automaticamente;</text:p>
      <text:p text:style-name="P1">6. Devem ser gerados indicadores de consenso de grupo, relatórios de decisões e histórico de decisões. <text:span text:style-name="T5">Caso os valores de uma alternativa superem de outras, a concordância existe. Caso empate, será necessário maior discussão do grupo;</text:span></text:p>
      <text:p text:style-name="P1">7. Votações devem ter prazo de término;</text:p>
      <text:p text:style-name="P2">8. Usuários podem criar votações;</text:p>
      <text:p text:style-name="P11">9. Haverá um sistema simples de login superusuário comparando Strings preestabelecida, para visualização e encerramento de resultados;</text:p>
      <text:p text:style-name="P11">10. Haverá identificação de usuário através de matrícula para inviabilizar votos duplicados.</text:p>
      <text:p text:style-name="P1"/>
      <text:p text:style-name="P5">Requisitos não funcionais:</text:p>
      <text:p text:style-name="P2"/>
      <text:p text:style-name="P2">1. <text:span text:style-name="T1">O sistema deve permitir múltiplas votações ao mesmo tempo;</text:span></text:p>
      <text:p text:style-name="P3">2. O sistema deve permitir encerramento de votação antes do prazo conforme superusuário;</text:p>
      <text:p text:style-name="P3">3. A visualização de votações deve ser feita da mais atual para a mais antiga, conforme prazo de encerramento;</text:p>
      <text:p text:style-name="P11">4. O usuário só pode votar em uma alternativa.</text:p>
      <text:p text:style-name="P2"/>
      <text:p text:style-name="P5">Regras de negócio:</text:p>
      <text:p text:style-name="P2"/>
      <text:p text:style-name="P2">1. Os resultados só podem ser acessados por um superusuário, evitando resultados enviesados;</text:p>
      <text:p text:style-name="P2">2. Votações encerradas não serão deletadas do banco de dados, mas alterad<text:span text:style-name="T1">o</text:span> o status para “ENCERRADA”. Isso preserva histórico para possíveis necessidades futuras.</text:p>
      <text:p text:style-name="P1"/>
      <text:p text:style-name="P5">Arquitetura do sistema:</text:p>
      <text:p text:style-name="P2"/>
      <text:p text:style-name="P3"><text:span text:style-name="T2">Backend</text:span>: Python puro;</text:p>
      <text:p text:style-name="P3"><text:span text:style-name="T2">Frontend</text:span>: Streamlit <text:span text:style-name="T3">ou </text:span><text:span text:style-name="T4">Plotly</text:span>;</text:p>
      <text:p text:style-name="P3"><text:span text:style-name="T2">Gráficos e análise de dados</text:span>: Pandas;</text:p>
      <text:p text:style-name="P3"><text:span text:style-name="T2">Banco de dados</text:span>: MySQL.</text:p>
      <text:p text:style-name="P12"><text:span text:style-name="T5">Bibliotecas: </text:span>SQLAlchemy <text:span text:style-name="T5">para gerenciamento de conexão.</text:span></text:p>
      <text:p text:style-name="P12"/>
      <text:p text:style-name="P8">Funcionamento do Software</text:p>
      <text:p text:style-name="P8"/>
      <text:p text:style-name="P8">1. Visão geral</text:p>
      <text:p text:style-name="P8"/>
      <text:p text:style-name="P15">O software está dividido, inicialmente, em sete (7) classes, sendo: Operacoes() e OperacoesAdmin() as classes que servem para realizar as operações do sistema. Para as lógicas de contagem e média de votos, LogicaMotor() abriga os cálculos. MenuUsuario() e MenuSuperUsuario() abrigam a interface de contato com o usuário. Votacoes(), Opcoes() e Votos() guardam os dados necessários para o sistema funcionar.</text:p>
      <text:p text:style-name="P15">Seu fluxo é simples e parte dos menus para as operações. e então para as lógicas de cálculo que buscam os dados.</text:p>
      <text:p text:style-name="P15"/>
      <text:p text:style-name="P8"><text:soft-page-break/><text:tab/>1.1 Diagrama de classes:</text:p>
      <text:p text:style-name="P8"/>
      <text:p text:style-name="P15">O diagrama de classes possui estrutura simples e foi pensado para comportar um sistema em Python puro com integração de banco de dados MySQL.</text:p>
      <text:p text:style-name="P15">Ele pode ser alterado conforme o desenvolvimento do sistema.</text:p>
      <text:p text:style-name="P15"/>
      <text:p text:style-name="P8"><draw:frame draw:style-name="fr1" draw:name="Quadro2" text:anchor-type="char" svg:width="17cm" draw:z-index="2"><draw:text-box fo:min-height="14.199cm"><text:p text:style-name="Figure"><draw:frame draw:style-name="fr2" draw:name="Figura2" text:anchor-type="char" svg:width="17cm" svg:height="14.199cm" draw:z-index="5"><draw:image xlink:href="Pictures/10000001000002F70000027A3C88B5AC.png" xlink:type="simple" xlink:show="embed" xlink:actuate="onLoad" draw:mime-type="image/png"/></draw:frame>Figura <text:sequence text:ref-name="refFigure1" text:name="Figure" text:formula="ooow:Figure+1" style:num-format="1">1</text:sequence>: Diagrama de classes do sistema.</text:p></draw:text-box></draw:frame></text:p>
      <text:p text:style-name="P9"><text:tab/>1.2 Diagrama de casos de uso</text:p>
      <text:p text:style-name="P9"/>
      <text:p text:style-name="P15">O diagrama de casos de uso descreve as operações básicas do sistema de forma superficial e dá um um panorama geral de seu funcionamento.</text:p>
      <text:p text:style-name="P9"><draw:frame draw:style-name="fr1" draw:name="Quadro3" text:anchor-type="char" svg:width="16.175cm" draw:z-index="3"><draw:text-box fo:min-height="11.497cm"><text:p text:style-name="Figure"><draw:frame draw:style-name="fr3" draw:name="Figura3" text:anchor-type="paragraph" svg:width="16.175cm" style:rel-width="100%" svg:height="11.497cm" style:rel-height="scale" draw:z-index="4"><draw:image xlink:href="Pictures/10000001000002F90000021D63272220.png" xlink:type="simple" xlink:show="embed" xlink:actuate="onLoad" draw:mime-type="image/png"/></draw:frame>Figura <text:sequence text:ref-name="refFigure2" text:name="Figure" text:formula="ooow:Figure+1" style:num-format="1">2</text:sequence>: Diagrama de casos de uso do sistema.</text:p></draw:text-box></draw:frame><text:soft-page-break/></text:p>
      <text:p text:style-name="P6"><text:span text:style-name="T8">2.</text:span><text:span text:style-name="T6"> </text:span>Banco de dados</text:p>
      <text:p text:style-name="P6"/>
      <text:p text:style-name="P13">O banco de dados é simples e consiste em três tabela que comportam os votos. sua contagem, suas alternativas e o id de quem votou. </text:p>
      <text:p text:style-name="P13">Seu funcionamento consiste em:</text:p>
      <text:p text:style-name="P13"/>
      <text:p text:style-name="P13">1. 1 voto possui 1 opção e N votações;</text:p>
      <text:p text:style-name="P13">2. 1 opção possui N votos e pertence a 1 votação;</text:p>
      <text:p text:style-name="P13">3. 1 votação possui N opções e N votos.</text:p>
      <text:p text:style-name="P13"/>
      <text:p text:style-name="P14">A seguir, temos a tabela lógica do banco que serve de persistência para todo o projeto:</text:p>
      <text:p text:style-name="P13"/>
      <text:p text:style-name="P13"/>
      <text:p text:style-name="P13"/>
      <text:p text:style-name="P7"><draw:frame draw:style-name="fr1" draw:name="Quadro1" text:anchor-type="char" svg:width="16.388cm" draw:z-index="0"><draw:text-box fo:min-height="7.352cm"><text:p text:style-name="Figure"><draw:frame draw:style-name="fr3" draw:name="Figura1" text:anchor-type="paragraph" svg:width="16.388cm" style:rel-width="100%" svg:height="7.352cm" style:rel-height="scale" draw:z-index="1"><draw:image xlink:href="Pictures/100000000000030C0000015EFDA29CC2.png" xlink:type="simple" xlink:show="embed" xlink:actuate="onLoad" draw:mime-type="image/png"/></draw:frame>Figura <text:sequence text:ref-name="refFigure0" text:name="Figure" text:formula="ooow:Figure+1" style:num-format="1">3</text:sequence>: Tabela lógica do banco de dados.</text:p></draw:text-box></draw:frame><text:soft-page-break/></text:p>
      <text:p text:style-name="P7"><text:tab/><text:span text:style-name="T8">2</text:span>.1 Tabela física</text:p>
      <text:p text:style-name="P7"/>
      <text:p text:style-name="P14">Para gerar a tabela física, basta copiar o código SQL presente no repositório do projeto e colar em um ambiente MySQL como o MySQL Workbench.</text:p>
      <text:p text:style-name="P16">OBS: <text:span text:style-name="T7">Note que em versões Linux o MySQL Workbench pode dar erro 1064, de sintaxe. Basta apagar as palavras ‘VISIBLE’ do códig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10:34:07.691306114</meta:creation-date>
    <dc:date>2026-04-17T14:26:32.875123695</dc:date>
    <meta:editing-duration>PT2H17M45S</meta:editing-duration>
    <meta:editing-cycles>11</meta:editing-cycles>
    <meta:generator>LibreOffice/24.2.7.2$Linux_X86_64 LibreOffice_project/420$Build-2</meta:generator>
    <meta:document-statistic meta:table-count="0" meta:image-count="3" meta:object-count="0" meta:page-count="4" meta:paragraph-count="48" meta:word-count="561" meta:character-count="3470" meta:non-whitespace-character-count="2953"/>
  </office:meta>
</office:document-meta>
</file>